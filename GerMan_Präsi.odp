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FC000000774BE85875C.jpg" manifest:media-type="image/jpeg"/>
  <manifest:file-entry manifest:full-path="Pictures/1000000100000A2C000003C05A18AA3C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+mn-cs" svg:font-family="+mn-cs"/>
    <style:font-face style:name="+mn-ea" svg:font-family="+mn-ea"/>
    <style:font-face style:name="+mn-lt" svg:font-family="+mn-lt"/>
    <style:font-face style:name="Adwaita Sans" svg:font-family="'Adwaita Sans'" style:font-family-generic="system" style:font-pitch="variable"/>
    <style:font-face style:name="Calibri" svg:font-family="Calibri"/>
    <style:font-face style:name="Calibri1" svg:font-family="Calibri" style:font-family-generic="swiss"/>
    <style:font-face style:name="Calibri2" svg:font-family="Calibri" style:font-family-generic="swiss" style:font-pitch="variable"/>
    <style:font-face style:name="Calibri3" svg:font-family="Calibri" style:font-family-generic="modern" style:font-pitch="fixed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Noto Serif" svg:font-family="'Noto Serif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2c3e6b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draw:fill="solid" draw:fill-color="#f8f9fa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4" style:family="graphic">
      <style:graphic-properties style:protect="size" loext:decorative="false"/>
    </style:style>
    <style:style style:name="gr5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6" style:family="graphic" style:parent-style-name="standard">
      <style:graphic-properties draw:stroke="solid" svg:stroke-width="0.071cm" svg:stroke-color="#4a90d9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loext:decorative="false"/>
    </style:style>
    <style:style style:name="gr7" style:family="graphic" style:parent-style-name="standard">
      <style:graphic-properties draw:stroke="solid" svg:stroke-width="0.035cm" svg:stroke-color="#dadce0" draw:fill="solid" draw:fill-color="#ffffff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8" style:family="graphic" style:parent-style-name="standard">
      <style:graphic-properties draw:stroke="solid" svg:stroke-width="0.035cm" svg:stroke-color="#4a90d9" draw:fill="solid" draw:fill-color="#4a90d9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9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0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1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2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3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4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5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7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8" style:family="graphic" style:parent-style-name="standard">
      <style:graphic-properties draw:stroke="solid" svg:stroke-width="0.035cm" svg:stroke-color="#dadce0" draw:fill="solid" draw:fill-color="#ffffff" draw:textarea-vertical-align="top" draw:auto-grow-height="false" fo:min-height="1.11cm" fo:min-width="22.277cm" fo:padding-top="0.125cm" fo:padding-bottom="0.125cm" fo:padding-left="0.25cm" fo:padding-right="0.25cm" fo:wrap-option="wrap" loext:decorative="false"/>
    </style:style>
    <style:style style:name="gr19" style:family="graphic" style:parent-style-name="standard">
      <style:graphic-properties draw:stroke="solid" svg:stroke-width="0.035cm" svg:stroke-color="#e8eef7" draw:fill="solid" draw:fill-color="#e8eef7" draw:textarea-vertical-align="top" draw:auto-grow-height="false" fo:min-height="1.11cm" fo:min-width="5.259cm" fo:padding-top="0.125cm" fo:padding-bottom="0.125cm" fo:padding-left="0.25cm" fo:padding-right="0.25cm" fo:wrap-option="wrap" loext:decorative="false"/>
    </style:style>
    <style:style style:name="gr20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.443cm" fo:min-width="5.842cm" fo:padding-top="0cm" fo:padding-bottom="0cm" fo:padding-left="0cm" fo:padding-right="0cm" fo:wrap-option="wrap" loext:decorative="false"/>
      <style:paragraph-properties style:writing-mode="lr-tb"/>
    </style:style>
    <style:style style:name="gr21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.443cm" fo:min-width="16.002cm" fo:padding-top="0cm" fo:padding-bottom="0cm" fo:padding-left="0cm" fo:padding-right="0cm" fo:wrap-option="wrap" loext:decorative="false"/>
      <style:paragraph-properties style:writing-mode="lr-tb"/>
    </style:style>
    <style:style style:name="gr22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.443cm" fo:min-width="5.842cm" fo:padding-top="0cm" fo:padding-bottom="0cm" fo:padding-left="0cm" fo:padding-right="0cm" fo:wrap-option="wrap" loext:decorative="false"/>
      <style:paragraph-properties style:writing-mode="lr-tb"/>
    </style:style>
    <style:style style:name="gr23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.443cm" fo:min-width="16.002cm" fo:padding-top="0cm" fo:padding-bottom="0cm" fo:padding-left="0cm" fo:padding-right="0cm" fo:wrap-option="wrap" loext:decorative="false"/>
      <style:paragraph-properties style:writing-mode="lr-tb"/>
    </style:style>
    <style:style style:name="gr24" style:family="graphic" style:parent-style-name="standard">
      <style:graphic-properties draw:stroke="solid" svg:stroke-width="0.035cm" svg:stroke-color="#dadce0" draw:fill="solid" draw:fill-color="#ffffff" draw:textarea-vertical-align="top" draw:auto-grow-height="false" fo:min-height="1.109cm" fo:min-width="22.277cm" fo:padding-top="0.125cm" fo:padding-bottom="0.125cm" fo:padding-left="0.25cm" fo:padding-right="0.25cm" fo:wrap-option="wrap" loext:decorative="false"/>
    </style:style>
    <style:style style:name="gr25" style:family="graphic" style:parent-style-name="standard">
      <style:graphic-properties draw:stroke="solid" svg:stroke-width="0.035cm" svg:stroke-color="#e8eef7" draw:fill="solid" draw:fill-color="#e8eef7" draw:textarea-vertical-align="top" draw:auto-grow-height="false" fo:min-height="1.109cm" fo:min-width="5.259cm" fo:padding-top="0.125cm" fo:padding-bottom="0.125cm" fo:padding-left="0.25cm" fo:padding-right="0.25cm" fo:wrap-option="wrap" loext:decorative="false"/>
    </style:style>
    <style:style style:name="gr26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.442cm" fo:min-width="5.842cm" fo:padding-top="0cm" fo:padding-bottom="0cm" fo:padding-left="0cm" fo:padding-right="0cm" fo:wrap-option="wrap" loext:decorative="false"/>
      <style:paragraph-properties style:writing-mode="lr-tb"/>
    </style:style>
    <style:style style:name="gr27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.442cm" fo:min-width="16.002cm" fo:padding-top="0cm" fo:padding-bottom="0cm" fo:padding-left="0cm" fo:padding-right="0cm" fo:wrap-option="wrap" loext:decorative="false"/>
      <style:paragraph-properties style:writing-mode="lr-tb"/>
    </style:style>
    <style:style style:name="gr28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.443cm" fo:min-width="5.842cm" fo:padding-top="0cm" fo:padding-bottom="0cm" fo:padding-left="0cm" fo:padding-right="0cm" fo:wrap-option="wrap" loext:decorative="false"/>
      <style:paragraph-properties style:writing-mode="lr-tb"/>
    </style:style>
    <style:style style:name="gr29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.443cm" fo:min-width="16.002cm" fo:padding-top="0cm" fo:padding-bottom="0cm" fo:padding-left="0cm" fo:padding-right="0cm" fo:wrap-option="wrap" loext:decorative="false"/>
      <style:paragraph-properties style:writing-mode="lr-tb"/>
    </style:style>
    <style:style style:name="gr30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.443cm" fo:min-width="5.842cm" fo:padding-top="0cm" fo:padding-bottom="0cm" fo:padding-left="0cm" fo:padding-right="0cm" fo:wrap-option="wrap" loext:decorative="false"/>
      <style:paragraph-properties style:writing-mode="lr-tb"/>
    </style:style>
    <style:style style:name="gr31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.443cm" fo:min-width="16.002cm" fo:padding-top="0cm" fo:padding-bottom="0cm" fo:padding-left="0cm" fo:padding-right="0cm" fo:wrap-option="wrap" loext:decorative="false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in-height="1.25cm" loext:decorative="false"/>
      <style:paragraph-properties style:writing-mode="lr-tb"/>
    </style:style>
    <style:style style:name="gr33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34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35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36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37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38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39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40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41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42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43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44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45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46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47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48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49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50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51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52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5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54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55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56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57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58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59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60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61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62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63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64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65" style:family="graphic" style:parent-style-name="standard">
      <style:graphic-properties draw:stroke="solid" svg:stroke-width="0.035cm" svg:stroke-color="#2c3e6b" draw:fill="solid" draw:fill-color="#2c3e6b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66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67" style:family="graphic" style:parent-style-name="standard" style:list-style-name="L10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68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.778cm" fo:min-width="22.352cm" fo:padding-top="0cm" fo:padding-bottom="0cm" fo:padding-left="0cm" fo:padding-right="0cm" fo:wrap-option="wrap" loext:decorative="false"/>
      <style:paragraph-properties style:writing-mode="lr-tb"/>
    </style:style>
    <style:style style:name="gr69" style:family="graphic" style:parent-style-name="standard">
      <style:graphic-properties draw:stroke="solid" svg:stroke-width="0.035cm" svg:stroke-color="#dadce0" draw:fill="solid" draw:fill-color="#ffffff" draw:textarea-vertical-align="top" draw:auto-grow-height="false" fo:min-height="9.507cm" fo:min-width="15.082cm" fo:padding-top="0.125cm" fo:padding-bottom="0.125cm" fo:padding-left="0.25cm" fo:padding-right="0.25cm" fo:wrap-option="wrap" loext:decorative="false"/>
    </style:style>
    <style:style style:name="gr70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7.62cm" fo:min-width="21.223cm" fo:padding-top="0cm" fo:padding-bottom="0cm" fo:padding-left="0cm" fo:padding-right="0cm" fo:wrap-option="wrap" loext:decorative="false"/>
      <style:paragraph-properties style:writing-mode="lr-tb"/>
    </style:style>
    <style:style style:name="gr71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.778cm" fo:min-width="22.352cm" fo:padding-top="0cm" fo:padding-bottom="0cm" fo:padding-left="0cm" fo:padding-right="0cm" fo:wrap-option="wrap" loext:decorative="false"/>
      <style:paragraph-properties style:writing-mode="lr-tb"/>
    </style:style>
    <style:style style:name="gr72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7.62cm" fo:min-width="21.223cm" fo:padding-top="0cm" fo:padding-bottom="0cm" fo:padding-left="0cm" fo:padding-right="0cm" fo:wrap-option="wrap" loext:decorative="false"/>
      <style:paragraph-properties style:writing-mode="lr-tb"/>
    </style:style>
    <style:style style:name="gr7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.907cm, 4.348cm, 0cm, 11.663cm)" draw:image-opacity="100%" style:mirror="none" loext:decorative="false"/>
    </style:style>
    <style:style style:name="gr74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75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76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.016cm" fo:min-width="21.336cm" fo:padding-top="0cm" fo:padding-bottom="0cm" fo:padding-left="0cm" fo:padding-right="0cm" fo:wrap-option="wrap" loext:decorative="false"/>
      <style:paragraph-properties style:writing-mode="lr-tb"/>
    </style:style>
    <style:style style:name="gr77" style:family="graphic" style:parent-style-name="standard" style:list-style-name="L1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pr1" style:family="presentation" style:parent-style-name="DEFAULT-note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DEFAULT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2.54cm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3" style:family="paragraph">
      <style:paragraph-properties fo:margin-left="0cm" fo:margin-right="0cm" fo:margin-top="0cm" fo:margin-bottom="0cm" fo:line-height="100%" fo:text-align="start" fo:text-indent="0cm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5" style:family="paragraph">
      <style:paragraph-properties fo:margin-left="0cm" fo:margin-right="0cm" fo:margin-top="0cm" fo:margin-bottom="0cm" fo:line-height="100%" fo:text-align="end" fo:text-indent="0cm" style:punctuation-wrap="hanging" loext:tab-stop-distance="2.54cm" style:writing-mode="lr-tb">
        <style:tab-stops/>
      </style:paragraph-properties>
      <style:text-properties fo:font-size="14pt" style:font-size-asian="14pt" style:font-size-complex="14pt" fo:hyphenate="false"/>
    </style:style>
    <style:style style:name="P6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7" style:family="paragraph">
      <loext:graphic-properties draw:fill="none"/>
      <style:paragraph-properties fo:text-align="start"/>
      <style:text-properties fo:font-size="18pt"/>
    </style:style>
    <style:style style:name="P8" style:family="paragraph">
      <loext:graphic-properties draw:fill="solid" draw:fill-color="#ffffff"/>
      <style:paragraph-properties fo:text-align="start"/>
      <style:text-properties fo:font-size="18pt"/>
    </style:style>
    <style:style style:name="P9" style:family="paragraph">
      <loext:graphic-properties draw:fill="solid" draw:fill-color="#4a90d9"/>
      <style:paragraph-properties fo:text-align="start"/>
      <style:text-properties fo:font-size="18pt"/>
    </style:style>
    <style:style style:name="P10" style:family="paragraph"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P11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loext:tab-stop-distance="2.54cm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="solid" draw:fill-color="#e8eef7"/>
      <style:paragraph-properties fo:text-align="start"/>
      <style:text-properties fo:font-size="18pt"/>
    </style:style>
    <style:style style:name="P14" style:family="paragraph">
      <style:text-properties fo:color="#2c3e6b" loext:opacity="100%" style:font-name="Calibri1" fo:font-size="12pt" style:font-size-asian="12pt" style:font-size-complex="12pt"/>
    </style:style>
    <style:style style:name="P15" style:family="paragraph">
      <loext:graphic-properties draw:fill="none" draw:fill-color="#ffffff"/>
      <style:text-properties fo:color="#2c3e6b" loext:opacity="100%" style:font-name="Calibri1" fo:font-size="12pt" style:font-size-asian="12pt" style:font-size-complex="12pt"/>
    </style:style>
    <style:style style:name="P16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P17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2.54cm" style:font-independent-line-spacing="true">
        <style:tab-stops/>
      </style:paragraph-properties>
      <style:text-properties fo:font-size="18pt" fo:hyphenate="false"/>
    </style:style>
    <style:style style:name="P18" style:family="paragraph">
      <loext:graphic-properties draw:fill="solid" draw:fill-color="#2c3e6b"/>
      <style:paragraph-properties fo:text-align="start"/>
      <style:text-properties fo:font-size="18pt"/>
    </style:style>
    <style:style style:name="P19" style:family="paragraph">
      <style:paragraph-properties fo:margin-left="0cm" fo:margin-right="0cm" fo:margin-top="0.1cm" fo:margin-bottom="0.1cm" fo:line-height="100%" fo:text-align="start" fo:text-indent="0cm" style:punctuation-wrap="hanging" loext:tab-stop-distance="2.54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Noto Sans" fo:font-size="18pt" fo:font-style="normal" fo:text-shadow="none" style:text-underline-style="none" fo:font-weight="normal" style:letter-kerning="true" style:font-name-asian="Noto Sans1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P20" style:family="paragraph">
      <loext:graphic-properties draw:fill="none"/>
      <style:paragraph-properties fo:margin-left="0cm" fo:margin-right="0cm" fo:margin-top="0.1cm" fo:margin-bottom="0.1cm" fo:line-height="100%" fo:text-align="start" fo:text-indent="0cm" style:punctuation-wrap="hanging" loext:tab-stop-distance="2.54cm" style:font-independent-line-spacing="tru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Noto Sans" fo:font-size="18pt" fo:font-style="normal" fo:text-shadow="none" style:text-underline-style="none" fo:font-weight="normal" style:letter-kerning="true" style:font-name-asian="Noto Sans1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P21" style:family="paragraph">
      <style:paragraph-properties fo:text-align="center"/>
    </style:style>
    <style:style style:name="T1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2" fo:font-size="48pt" fo:letter-spacing="normal" fo:language="en" fo:country="US" fo:font-style="normal" style:text-underline-style="none" fo:font-weight="bold" fo:background-color="transparent" style:font-name-asian="Calibri3" style:font-size-asian="48pt" style:font-style-asian="normal" style:font-weight-asian="bold" style:font-name-complex="Calibri2" style:font-size-complex="48pt" style:font-style-complex="normal" style:font-weight-complex="bold"/>
    </style:style>
    <style:style style:name="T2" style:family="text">
      <style:text-properties fo:font-variant="normal" fo:text-transform="none" fo:color="#e8eef7" loext:opacity="100%" style:text-outline="false" style:text-line-through-style="none" style:text-line-through-type="none" style:text-position="0% 100%" style:font-name="Calibri2" fo:font-size="18pt" fo:letter-spacing="normal" fo:language="en" fo:country="US" fo:font-style="normal" style:text-underline-style="none" fo:font-weight="normal" fo:background-color="transparent" style:font-name-asian="Calibri3" style:font-size-asian="18pt" style:font-style-asian="normal" style:font-weight-asian="normal" style:font-name-complex="Calibri2" style:font-size-complex="18pt" style:font-style-complex="normal" style:font-weight-complex="normal"/>
    </style:style>
    <style:style style:name="T3" style:family="text">
      <style:text-properties fo:font-variant="normal" fo:text-transform="none" fo:color="#e8eef7" loext:opacity="100%" style:text-outline="false" style:text-line-through-style="none" style:text-line-through-type="none" style:text-position="0% 100%" style:font-name="Calibri2" fo:font-size="12pt" fo:letter-spacing="normal" fo:language="en" fo:country="US" fo:font-style="normal" style:text-underline-style="none" fo:font-weight="normal" fo:background-color="transparent" style:font-name-asian="Calibri3" style:font-size-asian="12pt" style:font-style-asian="normal" style:font-weight-asian="normal" style:font-name-complex="Calibri2" style:font-size-complex="12pt" style:font-style-complex="normal" style:font-weight-complex="normal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+mn-lt" fo:font-size="12pt" fo:letter-spacing="normal" fo:language="en" fo:country="US" fo:font-style="normal" style:text-underline-style="none" fo:font-weight="normal" fo:background-color="transparent" style:font-name-asian="+mn-ea" style:font-size-asian="12pt" style:font-style-asian="normal" style:font-weight-asian="normal" style:font-name-complex="+mn-cs" style:font-size-complex="12pt" style:font-style-complex="normal" style:font-weight-complex="normal">
        <loext:char-complex-color loext:theme-type="dark1" loext:color-type="theme"/>
      </style:text-properties>
    </style:style>
    <style:style style:name="T6" style:family="text">
      <style:text-properties fo:font-variant="normal" fo:text-transform="none" fo:color="#2c3e6b" loext:opacity="100%" style:text-outline="false" style:text-line-through-style="none" style:text-line-through-type="none" style:text-position="0% 100%" style:font-name="Calibri2" fo:font-size="32pt" fo:letter-spacing="normal" fo:language="en" fo:country="US" fo:font-style="normal" style:text-underline-style="none" fo:font-weight="bold" fo:background-color="transparent" style:font-name-asian="Calibri3" style:font-size-asian="32pt" style:font-style-asian="normal" style:font-weight-asian="bold" style:font-name-complex="Calibri2" style:font-size-complex="32pt" style:font-style-complex="normal" style:font-weight-complex="bold"/>
    </style:style>
    <style:style style:name="T7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2" fo:font-size="14pt" fo:letter-spacing="normal" fo:language="en" fo:country="US" fo:font-style="normal" style:text-underline-style="none" fo:font-weight="bold" fo:background-color="transparent" style:font-name-asian="Calibri3" style:font-size-asian="14pt" style:font-style-asian="normal" style:font-weight-asian="bold" style:font-name-complex="Calibri2" style:font-size-complex="14pt" style:font-style-complex="normal" style:font-weight-complex="bold"/>
    </style:style>
    <style:style style:name="T8" style:family="text">
      <style:text-properties fo:font-variant="normal" fo:text-transform="none" fo:color="#1a1a2e" loext:opacity="100%" style:text-outline="false" style:text-line-through-style="none" style:text-line-through-type="none" style:text-position="0% 100%" style:font-name="Calibri2" fo:font-size="13pt" fo:letter-spacing="normal" fo:language="en" fo:country="US" fo:font-style="normal" style:text-underline-style="none" fo:font-weight="normal" fo:background-color="transparent" style:font-name-asian="Calibri3" style:font-size-asian="13pt" style:font-style-asian="normal" style:font-weight-asian="normal" style:font-name-complex="Calibri2" style:font-size-complex="13pt" style:font-style-complex="normal" style:font-weight-complex="normal"/>
    </style:style>
    <style:style style:name="T9" style:family="text">
      <style:text-properties fo:font-variant="normal" fo:text-transform="none" fo:color="#2c3e6b" loext:opacity="100%" style:text-outline="false" style:text-line-through-style="none" style:text-line-through-type="none" style:text-position="0% 100%" style:font-name="Calibri2" fo:font-size="13pt" fo:letter-spacing="normal" fo:language="en" fo:country="US" fo:font-style="normal" style:text-underline-style="none" fo:font-weight="bold" fo:background-color="transparent" style:font-name-asian="Calibri3" style:font-size-asian="13pt" style:font-style-asian="normal" style:font-weight-asian="bold" style:font-name-complex="Calibri2" style:font-size-complex="13pt" style:font-style-complex="normal" style:font-weight-complex="bold"/>
    </style:style>
    <style:style style:name="T10" style:family="text">
      <style:text-properties fo:color="#2c3e6b" loext:opacity="100%" style:font-name="Calibri1" fo:font-size="12pt" style:font-size-asian="12pt" style:font-size-complex="12pt"/>
    </style:style>
    <style:style style:name="T11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2" fo:font-size="20pt" fo:letter-spacing="normal" fo:language="en" fo:country="US" fo:font-style="normal" style:text-underline-style="none" fo:font-weight="bold" fo:background-color="transparent" style:font-name-asian="Calibri3" style:font-size-asian="20pt" style:font-style-asian="normal" style:font-weight-asian="bold" style:font-name-complex="Calibri2" style:font-size-complex="20pt" style:font-style-complex="normal" style:font-weight-complex="bold"/>
    </style:style>
    <style:style style:name="T12" style:family="text">
      <style:text-properties fo:font-variant="normal" fo:text-transform="none" fo:color="#6b7280" loext:opacity="100%" style:text-outline="false" style:text-line-through-style="none" style:text-line-through-type="none" style:text-position="0% 100%" style:font-name="Calibri2" fo:font-size="11pt" fo:letter-spacing="normal" fo:language="en" fo:country="US" fo:font-style="normal" style:text-underline-style="none" fo:font-weight="normal" fo:background-color="transparent" style:font-name-asian="Calibri3" style:font-size-asian="11pt" style:font-style-asian="normal" style:font-weight-asian="normal" style:font-name-complex="Calibri2" style:font-size-complex="11pt" style:font-style-complex="normal" style:font-weight-complex="normal"/>
    </style:style>
    <style:style style:name="T13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2" fo:font-size="32pt" fo:letter-spacing="normal" fo:language="en" fo:country="US" fo:font-style="normal" style:text-underline-style="none" fo:font-weight="bold" fo:background-color="transparent" style:font-name-asian="Calibri3" style:font-size-asian="32pt" style:font-style-asian="normal" style:font-weight-asian="bold" style:font-name-complex="Calibri2" style:font-size-complex="32pt" style:font-style-complex="normal" style:font-weight-complex="bold"/>
    </style:style>
    <style:style style:name="T14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2" fo:font-size="12pt" fo:letter-spacing="normal" fo:language="en" fo:country="US" fo:font-style="normal" style:text-underline-style="none" fo:font-weight="bold" fo:background-color="transparent" style:font-name-asian="Calibri3" style:font-size-asian="12pt" style:font-style-asian="normal" style:font-weight-asian="bold" style:font-name-complex="Calibri2" style:font-size-complex="12pt" style:font-style-complex="normal" style:font-weight-complex="bold"/>
    </style:style>
    <style:style style:name="T15" style:family="text">
      <style:text-properties fo:font-variant="normal" fo:text-transform="none" fo:color="#e8eef7" loext:opacity="100%" style:text-outline="false" style:text-line-through-style="none" style:text-line-through-type="none" style:text-position="0% 100%" style:font-name="Calibri2" fo:font-size="15pt" fo:letter-spacing="normal" fo:language="en" fo:country="US" fo:font-style="normal" style:text-underline-style="none" fo:font-weight="normal" fo:background-color="transparent" style:font-name-asian="Calibri3" style:font-size-asian="15pt" style:font-style-asian="normal" style:font-weight-asian="normal" style:font-name-complex="Calibri2" style:font-size-complex="15pt" style:font-style-complex="normal" style:font-weight-complex="normal"/>
    </style:style>
    <style:style style:name="T16" style:family="text">
      <style:text-properties fo:font-variant="normal" fo:text-transform="none" fo:color="#2c3e6b" loext:opacity="100%" style:text-outline="false" style:text-line-through-style="none" style:text-line-through-type="none" style:text-position="0% 100%" style:font-name="Calibri2" fo:font-size="14pt" fo:letter-spacing="normal" fo:language="en" fo:country="US" fo:font-style="normal" style:text-underline-style="none" fo:font-weight="bold" fo:background-color="transparent" style:font-name-asian="Calibri3" style:font-size-asian="14pt" style:font-style-asian="normal" style:font-weight-asian="bold" style:font-name-complex="Calibri2" style:font-size-complex="14pt" style:font-style-complex="normal" style:font-weight-complex="bold"/>
    </style:style>
    <style:style style:name="T17" style:family="text">
      <style:text-properties fo:font-variant="normal" fo:text-transform="none" fo:color="#e8eef7" loext:opacity="100%" style:text-outline="false" style:text-line-through-style="none" style:text-line-through-type="none" style:text-position="0% 100%" style:font-name="Calibri2" fo:font-size="13pt" fo:letter-spacing="normal" fo:language="en" fo:country="US" fo:font-style="normal" style:text-underline-style="none" fo:font-weight="normal" fo:background-color="transparent" style:font-name-asian="Calibri3" style:font-size-asian="13pt" style:font-style-asian="normal" style:font-weight-asian="normal" style:font-name-complex="Calibri2" style:font-size-complex="13pt" style:font-style-complex="normal" style:font-weight-complex="normal"/>
    </style:style>
    <style:style style:name="T18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2" fo:font-size="38pt" fo:letter-spacing="normal" fo:language="en" fo:country="US" fo:font-style="normal" style:text-underline-style="none" fo:font-weight="bold" fo:background-color="transparent" style:font-name-asian="Calibri3" style:font-size-asian="38pt" style:font-style-asian="normal" style:font-weight-asian="bold" style:font-name-complex="Calibri2" style:font-size-complex="38pt" style:font-style-complex="normal" style:font-weight-complex="bold"/>
    </style:style>
    <style:style style:name="T19" style:family="text">
      <style:text-properties fo:font-variant="normal" fo:text-transform="none" fo:color="#e8eef7" loext:opacity="100%" style:text-outline="false" style:text-line-through-style="none" style:text-line-through-type="none" style:text-position="0% 100%" style:font-name="Calibri2" fo:font-size="16pt" fo:letter-spacing="normal" fo:language="en" fo:country="US" fo:font-style="normal" style:text-underline-style="none" fo:font-weight="normal" fo:background-color="transparent" style:font-name-asian="Calibri3" style:font-size-asian="16pt" style:font-style-asian="normal" style:font-weight-asian="normal" style:font-name-complex="Calibri2" style:font-size-complex="16pt" style:font-style-complex="normal" style:font-weight-complex="normal"/>
    </style:style>
    <style:style style:name="T20" style:family="text">
      <style:text-properties fo:font-variant="normal" fo:text-transform="none" fo:color="#4a90d9" loext:opacity="100%" style:text-outline="false" style:text-line-through-style="none" style:text-line-through-type="none" style:text-position="0% 100%" style:font-name="Calibri2" fo:font-size="16pt" fo:letter-spacing="normal" fo:language="en" fo:country="US" fo:font-style="normal" style:text-underline-style="none" fo:font-weight="bold" fo:background-color="transparent" style:font-name-asian="Calibri3" style:font-size-asian="16pt" style:font-style-asian="normal" style:font-weight-asian="bold" style:font-name-complex="Calibri2" style:font-size-complex="16pt" style:font-style-complex="normal" style:font-weight-complex="bold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e8eef7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2c3e6b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7">
      <text:list-level-style-number text:level="1" style:num-format="">
        <style:list-level-properties text:min-label-width="0.6cm"/>
        <style:text-properties fo:color="#1a1a2e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8">
      <text:list-level-style-number text:level="1" style:num-format="">
        <style:list-level-properties text:min-label-width="0.6cm"/>
        <style:text-properties fo:color="#6b728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9">
      <text:list-level-style-bullet text:level="1" text:bullet-char="•">
        <style:list-level-properties text:min-label-width="0.953cm"/>
        <style:text-properties fo:font-family="OpenSymbol" fo:color="#1a1a2e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0">
      <text:list-level-style-bullet text:level="1" text:bullet-char="•">
        <style:list-level-properties text:min-label-width="0.953cm"/>
        <style:text-properties fo:font-family="OpenSymbol" fo:color="#e8eef7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1">
      <text:list-level-style-number text:level="1" style:num-format="">
        <style:list-level-properties text:min-label-width="0.6cm"/>
        <style:text-properties fo:color="#4a90d9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custom-shape draw:name="Text 0" draw:style-name="gr1" draw:text-style-name="P2" draw:layer="layout" svg:width="21.335cm" svg:height="3.047cm" svg:x="2.032cm" svg:y="4.064cm">
          <text:p text:style-name="P1"><text:span text:style-name="T1">GerMan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2" draw:text-style-name="P2" draw:layer="layout" svg:width="21.335cm" svg:height="2.539cm" svg:x="2.032cm" svg:y="7.62cm">
          <text:p text:style-name="P1"><text:span text:style-name="T2">Geräte Manger</text:span></text:p>
          <text:p text:style-name="P1"><text:span text:style-name="T2">mit Python &amp; SQLite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" draw:style-name="gr3" draw:text-style-name="P2" draw:layer="layout" svg:width="21.335cm" svg:height="1.015cm" svg:x="2.032cm" svg:y="12.192cm">
          <text:p text:style-name="P1"><text:span text:style-name="T3">Adrian – Eliano - Daniel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4" draw:layer="layout" svg:width="15.239cm" svg:height="8.572cm" svg:x="1.905cm" svg:y="3.175cm" draw:page-number="1" presentation:class="page"/>
          <draw:frame draw:name="Notes Placeholder 2" presentation:style-name="pr1" draw:text-style-name="P4" draw:layer="layout" svg:width="15.239cm" svg:height="10cm" svg:x="1.905cm" svg:y="12.224cm" presentation:class="notes" presentation:user-transformed="true">
            <draw:text-box>
              <text:p text:style-name="P3"><text:span text:style-name="T4">Kurze </text:span><text:span text:style-name="T4">Vorstellung: </text:span><text:span text:style-name="T4">Was ist das </text:span><text:span text:style-name="T4">Projekt? </text:span><text:span text:style-name="T4">Warum eine </text:span><text:span text:style-name="T4">Hardware-</text:span><text:span text:style-name="T4">Datenbank?</text:span></text:p>
            </draw:text-box>
          </draw:frame>
          <draw:frame draw:name="Slide Number Placeholder 3" presentation:style-name="pr2" draw:text-style-name="P6" draw:layer="layout" svg:width="8.254cm" svg:height="1.273cm" svg:x="10.791cm" svg:y="24.126cm" presentation:class="page-number" presentation:user-transformed="true">
            <draw:text-box>
              <text:p text:style-name="P5"><text:span text:style-name="T5"><text:page-number>&lt;number&gt;</text:page-number></text:span></text:p>
            </draw:text-box>
          </draw:frame>
        </presentation:notes>
      </draw:page>
      <draw:page draw:name="page2" draw:style-name="dp3" draw:master-page-name="DEFAULT">
        <draw:custom-shape draw:name="Text 0" draw:style-name="gr5" draw:text-style-name="P2" draw:layer="layout" svg:width="22.351cm" svg:height="1.777cm" svg:x="1.524cm" svg:y="0.889cm">
          <text:p text:style-name="P1"><text:span text:style-name="T6">Projektübersicht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hape 1" draw:style-name="gr6" draw:text-style-name="P7" draw:layer="layout" svg:x1="1.524cm" svg:y1="2.794cm" svg:x2="23.876cm" svg:y2="2.795cm">
          <text:p/>
        </draw:line>
        <draw:custom-shape draw:name="Shape 2" draw:style-name="gr7" draw:text-style-name="P8" draw:layer="layout" svg:width="7.238cm" svg:height="9.905cm" svg:x="1.27cm" svg:y="3.302cm">
          <text:p/>
          <draw:enhanced-geometry draw:mirror-horizontal="false" draw:mirror-vertical="false" draw:glue-points="?f8 0 0 ?f9 ?f8 ?f10 ?f11 ?f9" draw:text-areas="?f5 ?f5 ?f6 ?f7" svg:viewBox="0 0 0 0" draw:type="ooxml-roundRect" draw:modifiers="3509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Shape 3" draw:style-name="gr8" draw:text-style-name="P9" draw:layer="layout" svg:width="7.238cm" svg:height="1.396cm" svg:x="1.27cm" svg:y="3.302cm">
          <text:p/>
          <draw:enhanced-geometry draw:mirror-horizontal="false" draw:mirror-vertical="false" draw:glue-points="?f8 0 0 ?f9 ?f8 ?f10 ?f11 ?f9" draw:text-areas="?f5 ?f5 ?f6 ?f7" svg:viewBox="0 0 0 0" draw:type="ooxml-roundRect" draw:modifiers="18182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Text 4" draw:style-name="gr9" draw:text-style-name="P11" draw:layer="layout" svg:width="7.238cm" svg:height="1.396cm" svg:x="1.27cm" svg:y="3.302cm">
          <text:p text:style-name="P10"><text:span text:style-name="T7">Ziel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" draw:style-name="gr10" draw:text-style-name="P2" draw:layer="layout" svg:width="6.476cm" svg:height="7.619cm" svg:x="1.651cm" svg:y="5.08cm">
          <text:p text:style-name="P1"><text:span text:style-name="T8">Zentrale Verwaltung von Hardware und Standorten in einer Lokalen Datenbank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" draw:style-name="gr7" draw:text-style-name="P8" draw:layer="layout" svg:width="7.238cm" svg:height="9.905cm" svg:x="9.144cm" svg:y="3.302cm">
          <text:p/>
          <draw:enhanced-geometry draw:mirror-horizontal="false" draw:mirror-vertical="false" draw:glue-points="?f8 0 0 ?f9 ?f8 ?f10 ?f11 ?f9" draw:text-areas="?f5 ?f5 ?f6 ?f7" svg:viewBox="0 0 0 0" draw:type="ooxml-roundRect" draw:modifiers="3509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Shape 7" draw:style-name="gr8" draw:text-style-name="P9" draw:layer="layout" svg:width="7.238cm" svg:height="1.396cm" svg:x="9.144cm" svg:y="3.302cm">
          <text:p/>
          <draw:enhanced-geometry draw:mirror-horizontal="false" draw:mirror-vertical="false" draw:glue-points="?f8 0 0 ?f9 ?f8 ?f10 ?f11 ?f9" draw:text-areas="?f5 ?f5 ?f6 ?f7" svg:viewBox="0 0 0 0" draw:type="ooxml-roundRect" draw:modifiers="18182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Text 8" draw:style-name="gr11" draw:text-style-name="P11" draw:layer="layout" svg:width="7.238cm" svg:height="1.396cm" svg:x="9.144cm" svg:y="3.302cm">
          <text:p text:style-name="P10"><text:span text:style-name="T7">Technologien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9" draw:style-name="gr12" draw:text-style-name="P2" draw:layer="layout" svg:width="6.476cm" svg:height="7.619cm" svg:x="9.525cm" svg:y="5.08cm">
          <text:p text:style-name="P1"><text:span text:style-name="T8">Python – SQLite - RegEx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0" draw:style-name="gr7" draw:text-style-name="P8" draw:layer="layout" svg:width="7.238cm" svg:height="9.905cm" svg:x="17.018cm" svg:y="3.302cm">
          <text:p/>
          <draw:enhanced-geometry draw:mirror-horizontal="false" draw:mirror-vertical="false" draw:glue-points="?f8 0 0 ?f9 ?f8 ?f10 ?f11 ?f9" draw:text-areas="?f5 ?f5 ?f6 ?f7" svg:viewBox="0 0 0 0" draw:type="ooxml-roundRect" draw:modifiers="3509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Shape 11" draw:style-name="gr8" draw:text-style-name="P9" draw:layer="layout" svg:width="7.238cm" svg:height="1.396cm" svg:x="17.018cm" svg:y="3.302cm">
          <text:p/>
          <draw:enhanced-geometry draw:mirror-horizontal="false" draw:mirror-vertical="false" draw:glue-points="?f8 0 0 ?f9 ?f8 ?f10 ?f11 ?f9" draw:text-areas="?f5 ?f5 ?f6 ?f7" svg:viewBox="0 0 0 0" draw:type="ooxml-roundRect" draw:modifiers="18182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Text 12" draw:style-name="gr13" draw:text-style-name="P11" draw:layer="layout" svg:width="7.238cm" svg:height="1.396cm" svg:x="17.018cm" svg:y="3.302cm">
          <text:p text:style-name="P10"><text:span text:style-name="T7">Funktionen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3" draw:style-name="gr14" draw:text-style-name="P2" draw:layer="layout" svg:width="6.476cm" svg:height="7.619cm" svg:x="17.399cm" svg:y="5.08cm">
          <text:p text:style-name="P1"><text:span text:style-name="T8">Hinzufügen – Anzeigen – Suchen – Bearbeiten - Löschen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4" draw:layer="layout" svg:width="15.239cm" svg:height="8.572cm" svg:x="1.905cm" svg:y="3.175cm" draw:page-number="2" presentation:class="page"/>
          <draw:frame draw:name="Notes Placeholder 2" presentation:style-name="pr1" draw:text-style-name="P4" draw:layer="layout" svg:width="15.239cm" svg:height="10cm" svg:x="1.905cm" svg:y="12.224cm" presentation:class="notes" presentation:user-transformed="true">
            <draw:text-box>
              <text:p text:style-name="P3"><text:span text:style-name="T4">Kurz erklären was das Projekt macht und welche Technologien genutzt wurden.</text:span></text:p>
            </draw:text-box>
          </draw:frame>
          <draw:frame draw:name="Slide Number Placeholder 3" presentation:style-name="pr2" draw:text-style-name="P6" draw:layer="layout" svg:width="8.254cm" svg:height="1.273cm" svg:x="10.791cm" svg:y="24.126cm" presentation:class="page-number" presentation:user-transformed="true">
            <draw:text-box>
              <text:p text:style-name="P5"><text:span text:style-name="T5"><text:page-number>&lt;number&gt;</text:page-number></text:span></text:p>
            </draw:text-box>
          </draw:frame>
        </presentation:notes>
      </draw:page>
      <draw:page draw:name="page3" draw:style-name="dp3" draw:master-page-name="DEFAULT">
        <draw:custom-shape draw:name="Text 0" draw:style-name="gr15" draw:text-style-name="P2" draw:layer="layout" svg:width="22.351cm" svg:height="1.777cm" svg:x="1.524cm" svg:y="0.889cm">
          <text:p text:style-name="P1"><text:span text:style-name="T6">Datenbankstruktur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hape 1" draw:style-name="gr6" draw:text-style-name="P7" draw:layer="layout" svg:x1="1.524cm" svg:y1="2.794cm" svg:x2="23.876cm" svg:y2="2.795cm">
          <text:p/>
        </draw:line>
        <draw:frame draw:style-name="gr16" draw:text-style-name="P12" draw:layer="layout" svg:width="24.5cm" svg:height="9.031cm" svg:x="0.5cm" svg:y="3.5cm">
          <draw:image xlink:href="Pictures/1000000100000A2C000003C05A18AA3C.png" xlink:type="simple" xlink:show="embed" xlink:actuate="onLoad" draw:mime-type="image/png">
            <text:p/>
          </draw:image>
        </draw:frame>
        <presentation:notes draw:style-name="dp2">
          <draw:page-thumbnail draw:name="Slide Image Placeholder 1" draw:style-name="gr4" draw:layer="layout" svg:width="15.239cm" svg:height="8.572cm" svg:x="1.905cm" svg:y="3.175cm" draw:page-number="3" presentation:class="page"/>
          <draw:frame draw:name="Notes Placeholder 2" presentation:style-name="pr1" draw:text-style-name="P4" draw:layer="layout" svg:width="15.239cm" svg:height="10cm" svg:x="1.905cm" svg:y="12.224cm" presentation:class="notes" presentation:user-transformed="true">
            <draw:text-box>
              <text:p text:style-name="P3"><text:span text:style-name="T4">Zwei Tabellen: </text:span><text:span text:style-name="T4">Standort und </text:span><text:span text:style-name="T4">Gerät. FOREIGN </text:span><text:span text:style-name="T4">KEY verbindet </text:span><text:span text:style-name="T4">beide.</text:span></text:p>
            </draw:text-box>
          </draw:frame>
          <draw:frame draw:name="Slide Number Placeholder 3" presentation:style-name="pr2" draw:text-style-name="P6" draw:layer="layout" svg:width="8.254cm" svg:height="1.273cm" svg:x="10.791cm" svg:y="24.126cm" presentation:class="page-number" presentation:user-transformed="true">
            <draw:text-box>
              <text:p text:style-name="P5"><text:span text:style-name="T5"><text:page-number>&lt;number&gt;</text:page-number></text:span></text:p>
            </draw:text-box>
          </draw:frame>
        </presentation:notes>
      </draw:page>
      <draw:page draw:name="page4" draw:style-name="dp3" draw:master-page-name="DEFAULT">
        <draw:custom-shape draw:name="Text 0" draw:style-name="gr17" draw:text-style-name="P2" draw:layer="layout" svg:width="22.351cm" svg:height="1.777cm" svg:x="1.524cm" svg:y="0.889cm">
          <text:p text:style-name="P1"><text:span text:style-name="T6">Eingabevalidierung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hape 1" draw:style-name="gr6" draw:text-style-name="P7" draw:layer="layout" svg:x1="1.524cm" svg:y1="2.794cm" svg:x2="23.876cm" svg:y2="2.795cm">
          <text:p/>
        </draw:line>
        <draw:custom-shape draw:name="Shape 2" draw:style-name="gr18" draw:text-style-name="P8" draw:layer="layout" svg:width="22.859cm" svg:height="1.442cm" svg:x="1.27cm" svg:y="3.175cm">
          <text:p/>
          <draw:enhanced-geometry draw:mirror-horizontal="false" draw:mirror-vertical="false" draw:glue-points="?f8 0 0 ?f9 ?f8 ?f10 ?f11 ?f9" draw:text-areas="?f5 ?f5 ?f6 ?f7" svg:viewBox="0 0 0 0" draw:type="ooxml-roundRect" draw:modifiers="9756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Shape 3" draw:style-name="gr19" draw:text-style-name="P13" draw:layer="layout" svg:width="5.841cm" svg:height="1.442cm" svg:x="1.27cm" svg:y="3.175cm">
          <text:p/>
          <draw:enhanced-geometry draw:mirror-horizontal="false" draw:mirror-vertical="false" draw:glue-points="?f8 0 0 ?f9 ?f8 ?f10 ?f11 ?f9" draw:text-areas="?f5 ?f5 ?f6 ?f7" svg:viewBox="0 0 0 0" draw:type="ooxml-roundRect" draw:modifiers="9756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Text 4" draw:style-name="gr20" draw:text-style-name="P11" draw:layer="layout" svg:width="5.841cm" svg:height="1.442cm" svg:x="1.27cm" svg:y="3.175cm">
          <text:p text:style-name="P10"><text:span text:style-name="T9">pflichtfeld()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" draw:style-name="gr21" draw:text-style-name="P2" draw:layer="layout" svg:width="16.001cm" svg:height="1.442cm" svg:x="7.62cm" svg:y="3.175cm">
          <text:p text:style-name="P1"><text:span text:style-name="T8">Schleife fragt solange bis die Eingabe nicht leer ist.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" draw:style-name="gr18" draw:text-style-name="P8" draw:layer="layout" svg:width="22.859cm" svg:height="1.442cm" svg:x="1.27cm" svg:y="4.898cm">
          <text:p/>
          <draw:enhanced-geometry draw:mirror-horizontal="false" draw:mirror-vertical="false" draw:glue-points="?f8 0 0 ?f9 ?f8 ?f10 ?f11 ?f9" draw:text-areas="?f5 ?f5 ?f6 ?f7" svg:viewBox="0 0 0 0" draw:type="ooxml-roundRect" draw:modifiers="9756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Shape 7" draw:style-name="gr19" draw:text-style-name="P13" draw:layer="layout" svg:width="5.841cm" svg:height="1.442cm" svg:x="1.27cm" svg:y="4.898cm">
          <text:p/>
          <draw:enhanced-geometry draw:mirror-horizontal="false" draw:mirror-vertical="false" draw:glue-points="?f8 0 0 ?f9 ?f8 ?f10 ?f11 ?f9" draw:text-areas="?f5 ?f5 ?f6 ?f7" svg:viewBox="0 0 0 0" draw:type="ooxml-roundRect" draw:modifiers="9756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Text 8" draw:style-name="gr22" draw:text-style-name="P11" draw:layer="layout" svg:width="5.841cm" svg:height="1.442cm" svg:x="1.27cm" svg:y="4.898cm">
          <text:p text:style-name="P10"><text:span text:style-name="T9">ipEingabe()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9" draw:style-name="gr23" draw:text-style-name="P2" draw:layer="layout" svg:width="16.001cm" svg:height="1.442cm" svg:x="7.62cm" svg:y="4.898cm">
          <text:p text:style-name="P1"><text:span text:style-name="T8">Regex-Muster - jede Zahl muss im Ipv4 Format sein.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0" draw:style-name="gr24" draw:text-style-name="P8" draw:layer="layout" svg:width="22.859cm" svg:height="1.441cm" svg:x="1.27cm" svg:y="6.622cm">
          <text:p/>
          <draw:enhanced-geometry draw:mirror-horizontal="false" draw:mirror-vertical="false" draw:glue-points="?f8 0 0 ?f9 ?f8 ?f10 ?f11 ?f9" draw:text-areas="?f5 ?f5 ?f6 ?f7" svg:viewBox="0 0 0 0" draw:type="ooxml-roundRect" draw:modifiers="9756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Shape 11" draw:style-name="gr25" draw:text-style-name="P13" draw:layer="layout" svg:width="5.841cm" svg:height="1.441cm" svg:x="1.27cm" svg:y="6.622cm">
          <text:p/>
          <draw:enhanced-geometry draw:mirror-horizontal="false" draw:mirror-vertical="false" draw:glue-points="?f8 0 0 ?f9 ?f8 ?f10 ?f11 ?f9" draw:text-areas="?f5 ?f5 ?f6 ?f7" svg:viewBox="0 0 0 0" draw:type="ooxml-roundRect" draw:modifiers="9756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Text 12" draw:style-name="gr26" draw:text-style-name="P11" draw:layer="layout" svg:width="5.841cm" svg:height="1.441cm" svg:x="1.27cm" svg:y="6.622cm">
          <text:p text:style-name="P10"><text:span text:style-name="T9">macEingabe()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3" draw:style-name="gr27" draw:text-style-name="P2" draw:layer="layout" svg:width="16.001cm" svg:height="1.441cm" svg:x="7.62cm" svg:y="6.622cm">
          <text:p text:style-name="P1"><text:span text:style-name="T8">Format AA:BB:CC:DD:EE:FF - nur “:” als Trennzeichen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4" draw:style-name="gr18" draw:text-style-name="P8" draw:layer="layout" svg:width="22.859cm" svg:height="1.442cm" svg:x="1.27cm" svg:y="8.346cm">
          <text:p/>
          <draw:enhanced-geometry draw:mirror-horizontal="false" draw:mirror-vertical="false" draw:glue-points="?f8 0 0 ?f9 ?f8 ?f10 ?f11 ?f9" draw:text-areas="?f5 ?f5 ?f6 ?f7" svg:viewBox="0 0 0 0" draw:type="ooxml-roundRect" draw:modifiers="9756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Shape 15" draw:style-name="gr19" draw:text-style-name="P13" draw:layer="layout" svg:width="5.841cm" svg:height="1.442cm" svg:x="1.27cm" svg:y="8.346cm">
          <text:p/>
          <draw:enhanced-geometry draw:mirror-horizontal="false" draw:mirror-vertical="false" draw:glue-points="?f8 0 0 ?f9 ?f8 ?f10 ?f11 ?f9" draw:text-areas="?f5 ?f5 ?f6 ?f7" svg:viewBox="0 0 0 0" draw:type="ooxml-roundRect" draw:modifiers="9756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Text 16" draw:style-name="gr28" draw:text-style-name="P11" draw:layer="layout" svg:width="5.841cm" svg:height="1.442cm" svg:x="1.27cm" svg:y="8.346cm">
          <text:p text:style-name="P10"><text:span text:style-name="T9">statusEingabe()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7" draw:style-name="gr29" draw:text-style-name="P2" draw:layer="layout" svg:width="16.001cm" svg:height="1.442cm" svg:x="7.62cm" svg:y="8.346cm">
          <text:p text:style-name="P1"><text:span text:style-name="T8">Nur eine Auswahl möglich: Aktiv <text:s/>/ <text:s/>Defekt <text:s/>/ <text:s/>Ausgemustert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" draw:style-name="gr18" draw:text-style-name="P8" draw:layer="layout" svg:width="22.859cm" svg:height="1.442cm" svg:x="1.249cm" svg:y="10.058cm">
          <text:p/>
          <draw:enhanced-geometry draw:mirror-horizontal="false" draw:mirror-vertical="false" draw:glue-points="?f8 0 0 ?f9 ?f8 ?f10 ?f11 ?f9" draw:text-areas="?f5 ?f5 ?f6 ?f7" svg:viewBox="0 0 0 0" draw:type="ooxml-roundRect" draw:modifiers="9756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Shape 9" draw:style-name="gr19" draw:text-style-name="P13" draw:layer="layout" svg:width="5.841cm" svg:height="1.442cm" svg:x="1.249cm" svg:y="10.058cm">
          <text:p/>
          <draw:enhanced-geometry draw:mirror-horizontal="false" draw:mirror-vertical="false" draw:glue-points="?f8 0 0 ?f9 ?f8 ?f10 ?f11 ?f9" draw:text-areas="?f5 ?f5 ?f6 ?f7" svg:viewBox="0 0 0 0" draw:type="ooxml-roundRect" draw:modifiers="9756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Text 22" draw:style-name="gr30" draw:text-style-name="P11" draw:layer="layout" svg:width="5.841cm" svg:height="1.442cm" svg:x="1.249cm" svg:y="10.058cm">
          <text:p text:style-name="P10"><text:span text:style-name="T9">s</text:span><text:span text:style-name="T9">e</text:span><text:span text:style-name="T9">t</text:span><text:span text:style-name="T9">z</text:span><text:span text:style-name="T9">e</text:span><text:span text:style-name="T9">K</text:span><text:span text:style-name="T9">a</text:span><text:span text:style-name="T9">t</text:span><text:span text:style-name="T9">e</text:span><text:span text:style-name="T9">g</text:span><text:span text:style-name="T9">o</text:span><text:span text:style-name="T9">r</text:span><text:span text:style-name="T9">i</text:span><text:span text:style-name="T9">e</text:span><text:span text:style-name="T9">(</text:span><text:span text:style-name="T9">)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3" draw:style-name="gr31" draw:text-style-name="P2" draw:layer="layout" svg:width="16.001cm" svg:height="1.442cm" svg:x="7.599cm" svg:y="10.058cm">
          <text:p text:style-name="P1"><text:span text:style-name="T8">Gibt nur bestimmte Hardware Kategorien als Auswahlmöglichkeiten.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2" draw:text-style-name="P15" draw:layer="layout" svg:width="22.5cm" svg:height="1.5cm" svg:x="1.5cm" svg:y="12cm">
          <draw:text-box>
            <text:p text:style-name="P14"><text:span text:style-name="T10">Diese Funktionen sind Modular und können deshalb einfach bearbeitet und bei bedarf erweitert werden.</text:span></text:p>
          </draw:text-box>
        </draw:frame>
        <presentation:notes draw:style-name="dp2">
          <draw:page-thumbnail draw:name="Slide Image Placeholder 1" draw:style-name="gr4" draw:layer="layout" svg:width="15.239cm" svg:height="8.572cm" svg:x="1.905cm" svg:y="3.175cm" draw:page-number="4" presentation:class="page"/>
          <draw:frame draw:name="Notes Placeholder 2" presentation:style-name="pr1" draw:text-style-name="P4" draw:layer="layout" svg:width="15.239cm" svg:height="10cm" svg:x="1.905cm" svg:y="12.224cm" presentation:class="notes" presentation:user-transformed="true">
            <draw:text-box>
              <text:p text:style-name="P3"><text:span text:style-name="T4">Validierung verhindert fehlerhafte Daten. Regex für IP und MAC </text:span><text:span text:style-name="T4">kurz erklären.</text:span></text:p>
            </draw:text-box>
          </draw:frame>
          <draw:frame draw:name="Slide Number Placeholder 3" presentation:style-name="pr2" draw:text-style-name="P6" draw:layer="layout" svg:width="8.254cm" svg:height="1.273cm" svg:x="10.791cm" svg:y="24.126cm" presentation:class="page-number" presentation:user-transformed="true">
            <draw:text-box>
              <text:p text:style-name="P5"><text:span text:style-name="T5"><text:page-number>&lt;number&gt;</text:page-number></text:span></text:p>
            </draw:text-box>
          </draw:frame>
        </presentation:notes>
      </draw:page>
      <draw:page draw:name="page5" draw:style-name="dp3" draw:master-page-name="DEFAULT">
        <draw:custom-shape draw:name="Text 0" draw:style-name="gr33" draw:text-style-name="P2" draw:layer="layout" svg:width="22.351cm" svg:height="1.777cm" svg:x="1.524cm" svg:y="0.889cm">
          <text:p text:style-name="P1"><text:span text:style-name="T6">Funktionen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hape 1" draw:style-name="gr6" draw:text-style-name="P7" draw:layer="layout" svg:x1="1.524cm" svg:y1="2.794cm" svg:x2="23.876cm" svg:y2="2.795cm">
          <text:p/>
        </draw:line>
        <draw:custom-shape draw:name="Shape 2" draw:style-name="gr7" draw:text-style-name="P8" draw:layer="layout" svg:width="4.19cm" svg:height="9.905cm" svg:x="1.143cm" svg:y="3.302cm">
          <text:p/>
          <draw:enhanced-geometry draw:mirror-horizontal="false" draw:mirror-vertical="false" draw:glue-points="?f8 0 0 ?f9 ?f8 ?f10 ?f11 ?f9" draw:text-areas="?f5 ?f5 ?f6 ?f7" svg:viewBox="0 0 0 0" draw:type="ooxml-roundRect" draw:modifiers="6061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Shape 3" draw:style-name="gr8" draw:text-style-name="P9" draw:layer="layout" svg:width="1.904cm" svg:height="1.904cm" svg:x="2.286cm" svg:y="3.81cm">
          <text:p/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4" draw:style-name="gr34" draw:text-style-name="P11" draw:layer="layout" svg:width="1.904cm" svg:height="1.904cm" svg:x="2.286cm" svg:y="3.81cm">
          <text:p text:style-name="P10"><text:span text:style-name="T11">1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" draw:style-name="gr35" draw:text-style-name="P11" draw:layer="layout" svg:width="4.19cm" svg:height="1.142cm" svg:x="1.143cm" svg:y="6.223cm">
          <text:p text:style-name="P10"><text:span text:style-name="T9">Hinzufügen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" draw:style-name="gr36" draw:text-style-name="P11" draw:layer="layout" svg:width="3.809cm" svg:height="4.825cm" svg:x="1.346cm" svg:y="7.62cm">
          <text:p text:style-name="P10"><text:span text:style-name="T12">Standort oder Gerät</text:span></text:p>
          <text:p text:style-name="P10"><text:span text:style-name="T12">Erstellen und als Datensatz hinzufügen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" draw:style-name="gr7" draw:text-style-name="P8" draw:layer="layout" svg:width="4.19cm" svg:height="9.905cm" svg:x="5.791cm" svg:y="3.302cm">
          <text:p/>
          <draw:enhanced-geometry draw:mirror-horizontal="false" draw:mirror-vertical="false" draw:glue-points="?f8 0 0 ?f9 ?f8 ?f10 ?f11 ?f9" draw:text-areas="?f5 ?f5 ?f6 ?f7" svg:viewBox="0 0 0 0" draw:type="ooxml-roundRect" draw:modifiers="6061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Shape 8" draw:style-name="gr8" draw:text-style-name="P9" draw:layer="layout" svg:width="1.904cm" svg:height="1.904cm" svg:x="6.934cm" svg:y="3.81cm">
          <text:p/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9" draw:style-name="gr37" draw:text-style-name="P11" draw:layer="layout" svg:width="1.904cm" svg:height="1.904cm" svg:x="6.934cm" svg:y="3.81cm">
          <text:p text:style-name="P10"><text:span text:style-name="T11">2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0" draw:style-name="gr38" draw:text-style-name="P11" draw:layer="layout" svg:width="4.19cm" svg:height="1.142cm" svg:x="5.791cm" svg:y="6.223cm">
          <text:p text:style-name="P10"><text:span text:style-name="T9">Anzeigen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1" draw:style-name="gr39" draw:text-style-name="P11" draw:layer="layout" svg:width="3.809cm" svg:height="4.825cm" svg:x="5.994cm" svg:y="7.62cm">
          <text:p text:style-name="P10"><text:span text:style-name="T12">Alle Einträge</text:span></text:p>
          <text:p text:style-name="P10"><text:span text:style-name="T12">tabellarisch ausgeben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" draw:style-name="gr7" draw:text-style-name="P8" draw:layer="layout" svg:width="4.19cm" svg:height="9.905cm" svg:x="10.439cm" svg:y="3.302cm">
          <text:p/>
          <draw:enhanced-geometry draw:mirror-horizontal="false" draw:mirror-vertical="false" draw:glue-points="?f8 0 0 ?f9 ?f8 ?f10 ?f11 ?f9" draw:text-areas="?f5 ?f5 ?f6 ?f7" svg:viewBox="0 0 0 0" draw:type="ooxml-roundRect" draw:modifiers="6061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Shape 13" draw:style-name="gr8" draw:text-style-name="P9" draw:layer="layout" svg:width="1.904cm" svg:height="1.904cm" svg:x="11.582cm" svg:y="3.81cm">
          <text:p/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14" draw:style-name="gr40" draw:text-style-name="P11" draw:layer="layout" svg:width="1.904cm" svg:height="1.904cm" svg:x="11.582cm" svg:y="3.81cm">
          <text:p text:style-name="P10"><text:span text:style-name="T11">3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5" draw:style-name="gr41" draw:text-style-name="P11" draw:layer="layout" svg:width="4.19cm" svg:height="1.142cm" svg:x="10.439cm" svg:y="6.223cm">
          <text:p text:style-name="P10"><text:span text:style-name="T9">Suchen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6" draw:style-name="gr42" draw:text-style-name="P11" draw:layer="layout" svg:width="3.809cm" svg:height="4.825cm" svg:x="10.643cm" svg:y="7.62cm">
          <text:p text:style-name="P10"><text:span text:style-name="T12">Exakte Suche nach ID,</text:span></text:p>
          <text:p text:style-name="P10"><text:span text:style-name="T12">Kürzel, Status, usw.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7" draw:style-name="gr7" draw:text-style-name="P8" draw:layer="layout" svg:width="4.19cm" svg:height="9.905cm" svg:x="15.088cm" svg:y="3.302cm">
          <text:p/>
          <draw:enhanced-geometry draw:mirror-horizontal="false" draw:mirror-vertical="false" draw:glue-points="?f8 0 0 ?f9 ?f8 ?f10 ?f11 ?f9" draw:text-areas="?f5 ?f5 ?f6 ?f7" svg:viewBox="0 0 0 0" draw:type="ooxml-roundRect" draw:modifiers="6061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Shape 18" draw:style-name="gr8" draw:text-style-name="P9" draw:layer="layout" svg:width="1.904cm" svg:height="1.904cm" svg:x="16.231cm" svg:y="3.81cm">
          <text:p/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19" draw:style-name="gr43" draw:text-style-name="P11" draw:layer="layout" svg:width="1.904cm" svg:height="1.904cm" svg:x="16.231cm" svg:y="3.81cm">
          <text:p text:style-name="P10"><text:span text:style-name="T11">4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0" draw:style-name="gr44" draw:text-style-name="P11" draw:layer="layout" svg:width="4.19cm" svg:height="1.142cm" svg:x="15.088cm" svg:y="6.223cm">
          <text:p text:style-name="P10"><text:span text:style-name="T9">Bearbeiten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1" draw:style-name="gr45" draw:text-style-name="P11" draw:layer="layout" svg:width="3.809cm" svg:height="4.825cm" svg:x="15.291cm" svg:y="7.62cm">
          <text:p text:style-name="P10"><text:span text:style-name="T12">Felder einzeln ändern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2" draw:style-name="gr7" draw:text-style-name="P8" draw:layer="layout" svg:width="4.19cm" svg:height="9.905cm" svg:x="19.736cm" svg:y="3.302cm">
          <text:p/>
          <draw:enhanced-geometry draw:mirror-horizontal="false" draw:mirror-vertical="false" draw:glue-points="?f8 0 0 ?f9 ?f8 ?f10 ?f11 ?f9" draw:text-areas="?f5 ?f5 ?f6 ?f7" svg:viewBox="0 0 0 0" draw:type="ooxml-roundRect" draw:modifiers="6061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Shape 23" draw:style-name="gr8" draw:text-style-name="P9" draw:layer="layout" svg:width="1.904cm" svg:height="1.904cm" svg:x="20.879cm" svg:y="3.81cm">
          <text:p/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24" draw:style-name="gr46" draw:text-style-name="P11" draw:layer="layout" svg:width="1.904cm" svg:height="1.904cm" svg:x="20.879cm" svg:y="3.81cm">
          <text:p text:style-name="P10"><text:span text:style-name="T11">5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5" draw:style-name="gr47" draw:text-style-name="P11" draw:layer="layout" svg:width="4.19cm" svg:height="1.142cm" svg:x="19.736cm" svg:y="6.223cm">
          <text:p text:style-name="P10"><text:span text:style-name="T9">Löschen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6" draw:style-name="gr48" draw:text-style-name="P11" draw:layer="layout" svg:width="3.809cm" svg:height="4.825cm" svg:x="19.939cm" svg:y="7.62cm">
          <text:p text:style-name="P10"><text:span text:style-name="T12">Eintrag mit</text:span></text:p>
          <text:p text:style-name="P10"><text:span text:style-name="T12">einer Bestätigung</text:span><text:span text:style-name="T12"><text:line-break/></text:span><text:span text:style-name="T12">entfernen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4" draw:layer="layout" svg:width="15.239cm" svg:height="8.572cm" svg:x="1.905cm" svg:y="3.175cm" draw:page-number="5" presentation:class="page"/>
          <draw:frame draw:name="Notes Placeholder 2" presentation:style-name="pr1" draw:text-style-name="P4" draw:layer="layout" svg:width="15.239cm" svg:height="10cm" svg:x="1.905cm" svg:y="12.224cm" presentation:class="notes" presentation:user-transformed="true">
            <draw:text-box>
              <text:p text:style-name="P3"><text:span text:style-name="T4">Erkläre kurz match/case als Struktur hinter den 5 Optionen.</text:span></text:p>
            </draw:text-box>
          </draw:frame>
          <draw:frame draw:name="Slide Number Placeholder 3" presentation:style-name="pr2" draw:text-style-name="P6" draw:layer="layout" svg:width="8.254cm" svg:height="1.273cm" svg:x="10.791cm" svg:y="24.126cm" presentation:class="page-number" presentation:user-transformed="true">
            <draw:text-box>
              <text:p text:style-name="P5"><text:span text:style-name="T5"><text:page-number>&lt;number&gt;</text:page-number></text:span></text:p>
            </draw:text-box>
          </draw:frame>
        </presentation:notes>
      </draw:page>
      <draw:page draw:name="page6" draw:style-name="dp1" draw:master-page-name="DEFAULT">
        <draw:custom-shape draw:name="Text 0" draw:style-name="gr49" draw:text-style-name="P2" draw:layer="layout" svg:width="21.335cm" svg:height="1.777cm" svg:x="2.032cm" svg:y="0.889cm">
          <text:p text:style-name="P1"><text:span text:style-name="T13">Live-Demo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hape 1" draw:style-name="gr6" draw:text-style-name="P7" draw:layer="layout" svg:x1="2.032cm" svg:y1="2.794cm" svg:x2="23.368cm" svg:y2="2.795cm">
          <text:p/>
        </draw:line>
        <draw:custom-shape draw:name="Shape 2" draw:style-name="gr8" draw:text-style-name="P9" draw:layer="layout" svg:width="1.066cm" svg:height="1.066cm" svg:x="2.032cm" svg:y="3.429cm">
          <text:p/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3" draw:style-name="gr50" draw:text-style-name="P11" draw:layer="layout" svg:width="1.066cm" svg:height="1.066cm" svg:x="2.032cm" svg:y="3.429cm">
          <text:p text:style-name="P10"><text:span text:style-name="T14">1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" draw:style-name="gr51" draw:text-style-name="P2" draw:layer="layout" svg:width="19.049cm" svg:height="1.396cm" svg:x="3.556cm" svg:y="3.302cm">
          <text:p text:style-name="P1"><text:span text:style-name="T15">Gesamte Datenbank anzeigen lassen.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" draw:style-name="gr8" draw:text-style-name="P9" draw:layer="layout" svg:width="1.066cm" svg:height="1.066cm" svg:x="2.032cm" svg:y="5.156cm">
          <text:p/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6" draw:style-name="gr52" draw:text-style-name="P11" draw:layer="layout" svg:width="1.066cm" svg:height="1.066cm" svg:x="2.032cm" svg:y="5.156cm">
          <text:p text:style-name="P10"><text:span text:style-name="T14">2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7" draw:style-name="gr53" draw:text-style-name="P2" draw:layer="layout" svg:width="19.049cm" svg:height="1.396cm" svg:x="3.556cm" svg:y="5.029cm">
          <text:p text:style-name="P1"><text:span text:style-name="T15">Gerät hinzufügen, mit Valedirungs Test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" draw:style-name="gr8" draw:text-style-name="P9" draw:layer="layout" svg:width="1.066cm" svg:height="1.066cm" svg:x="2.032cm" svg:y="6.883cm">
          <text:p/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9" draw:style-name="gr54" draw:text-style-name="P11" draw:layer="layout" svg:width="1.066cm" svg:height="1.066cm" svg:x="2.032cm" svg:y="6.883cm">
          <text:p text:style-name="P10"><text:span text:style-name="T14">3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0" draw:style-name="gr55" draw:text-style-name="P2" draw:layer="layout" svg:width="19.049cm" svg:height="1.396cm" svg:x="3.556cm" svg:y="6.756cm">
          <text:p text:style-name="P1"><text:span text:style-name="T15">Nach dem Gerät suchen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" draw:style-name="gr8" draw:text-style-name="P9" draw:layer="layout" svg:width="1.066cm" svg:height="1.066cm" svg:x="2.032cm" svg:y="8.611cm">
          <text:p/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12" draw:style-name="gr56" draw:text-style-name="P11" draw:layer="layout" svg:width="1.066cm" svg:height="1.066cm" svg:x="2.032cm" svg:y="8.611cm">
          <text:p text:style-name="P10"><text:span text:style-name="T14">4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3" draw:style-name="gr57" draw:text-style-name="P2" draw:layer="layout" svg:width="19.049cm" svg:height="1.396cm" svg:x="3.556cm" svg:y="8.484cm">
          <text:p text:style-name="P1"><text:span text:style-name="T15">Das Gerät bearbeiten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4" draw:style-name="gr8" draw:text-style-name="P9" draw:layer="layout" svg:width="1.066cm" svg:height="1.066cm" svg:x="2.032cm" svg:y="10.338cm">
          <text:p/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15" draw:style-name="gr58" draw:text-style-name="P11" draw:layer="layout" svg:width="1.066cm" svg:height="1.066cm" svg:x="2.032cm" svg:y="10.338cm">
          <text:p text:style-name="P10"><text:span text:style-name="T14">5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6" draw:style-name="gr59" draw:text-style-name="P2" draw:layer="layout" svg:width="19.049cm" svg:height="1.396cm" svg:x="3.556cm" svg:y="10.211cm">
          <text:p text:style-name="P1"><text:span text:style-name="T15">Datensatz löschen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7" draw:style-name="gr8" draw:text-style-name="P9" draw:layer="layout" svg:width="1.066cm" svg:height="1.066cm" svg:x="2.032cm" svg:y="12.065cm">
          <text:p/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18" draw:style-name="gr60" draw:text-style-name="P11" draw:layer="layout" svg:width="1.066cm" svg:height="1.066cm" svg:x="2.032cm" svg:y="12.065cm">
          <text:p text:style-name="P10"><text:span text:style-name="T14">6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9" draw:style-name="gr61" draw:text-style-name="P2" draw:layer="layout" svg:width="19.049cm" svg:height="1.396cm" svg:x="3.556cm" svg:y="11.938cm">
          <text:p text:style-name="P1"><text:span text:style-name="T15">Das gleiche mit dem Standort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4" draw:layer="layout" svg:width="15.239cm" svg:height="8.572cm" svg:x="1.905cm" svg:y="3.175cm" draw:page-number="6" presentation:class="page"/>
          <draw:frame draw:name="Notes Placeholder 2" presentation:style-name="pr1" draw:text-style-name="P4" draw:layer="layout" svg:width="15.239cm" svg:height="10cm" svg:x="1.905cm" svg:y="12.224cm" presentation:class="notes" presentation:user-transformed="true">
            <draw:text-box>
              <text:p text:style-name="P3"><text:span text:style-name="T4">Ruhig </text:span><text:span text:style-name="T4">vorgehen, </text:span><text:span text:style-name="T4">Schritte laut </text:span><text:span text:style-name="T4">kommentier</text:span><text:span text:style-name="T4">en. Vorher </text:span><text:span text:style-name="T4">2-3x üben!</text:span></text:p>
            </draw:text-box>
          </draw:frame>
          <draw:frame draw:name="Slide Number Placeholder 3" presentation:style-name="pr2" draw:text-style-name="P6" draw:layer="layout" svg:width="8.254cm" svg:height="1.273cm" svg:x="10.791cm" svg:y="24.126cm" presentation:class="page-number" presentation:user-transformed="true">
            <draw:text-box>
              <text:p text:style-name="P5"><text:span text:style-name="T5"><text:page-number>&lt;number&gt;</text:page-number></text:span></text:p>
            </draw:text-box>
          </draw:frame>
        </presentation:notes>
      </draw:page>
      <draw:page draw:name="page7" draw:style-name="dp3" draw:master-page-name="DEFAULT">
        <draw:custom-shape draw:name="Text 0" draw:style-name="gr62" draw:text-style-name="P2" draw:layer="layout" svg:width="22.351cm" svg:height="1.777cm" svg:x="1.524cm" svg:y="0.889cm">
          <text:p text:style-name="P1"><text:span text:style-name="T6">Einschränkungen &amp; Vorteile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hape 1" draw:style-name="gr6" draw:text-style-name="P7" draw:layer="layout" svg:x1="1.524cm" svg:y1="2.794cm" svg:x2="23.876cm" svg:y2="2.795cm">
          <text:p/>
        </draw:line>
        <draw:custom-shape draw:name="Shape 2" draw:style-name="gr7" draw:text-style-name="P8" draw:layer="layout" svg:width="10.921cm" svg:height="9.905cm" svg:x="1.27cm" svg:y="3.302cm">
          <text:p/>
          <draw:enhanced-geometry draw:mirror-horizontal="false" draw:mirror-vertical="false" draw:glue-points="?f8 0 0 ?f9 ?f8 ?f10 ?f11 ?f9" draw:text-areas="?f5 ?f5 ?f6 ?f7" svg:viewBox="0 0 0 0" draw:type="ooxml-roundRect" draw:modifiers="2564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Text 3" draw:style-name="gr63" draw:text-style-name="P11" draw:layer="layout" svg:width="10.921cm" svg:height="1.142cm" svg:x="1.27cm" svg:y="3.505cm">
          <text:p text:style-name="P10"><text:span text:style-name="T16">Einschränkung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" draw:style-name="gr64" draw:text-style-name="P17" draw:layer="layout" svg:width="9.905cm" svg:height="7.619cm" svg:x="1.778cm" svg:y="4.953cm">
          <text:list text:style-name="L9">
            <text:list-item>
              <text:p text:style-name="P16"><text:span text:style-name="T8">Nur Exakte Suche, also keine Teilsuche.</text:span></text:p>
            </text:list-item>
            <text:list-item>
              <text:p text:style-name="P16"><text:span text:style-name="T8">Standort änderungen werden nicht direkt auf Geräte übertragen.</text:span></text:p>
            </text:list-item>
            <text:list-item>
              <text:p text:style-name="P16"><text:span text:style-name="T8">Keine sortierte Anzeige.</text:span></text:p>
            </text:list-item>
            <text:list-item>
              <text:p text:style-name="P16"><text:span text:style-name="T8">Keine Authentifizierung z.B. durch Benutzer Accounts.</text:span></text:p>
            </text:list-item>
            <text:list-item>
              <text:p text:style-name="P16"><text:span text:style-name="T8">match/case nur ab Python 3.10 verfügbar.</text:span></text:p>
            </text:list-item>
          </text:list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" draw:style-name="gr65" draw:text-style-name="P18" draw:layer="layout" svg:width="10.921cm" svg:height="9.905cm" svg:x="13.208cm" svg:y="3.302cm">
          <text:p/>
          <draw:enhanced-geometry draw:mirror-horizontal="false" draw:mirror-vertical="false" draw:glue-points="?f8 0 0 ?f9 ?f8 ?f10 ?f11 ?f9" draw:text-areas="?f5 ?f5 ?f6 ?f7" svg:viewBox="0 0 0 0" draw:type="ooxml-roundRect" draw:modifiers="2564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Text 6" draw:style-name="gr66" draw:text-style-name="P11" draw:layer="layout" svg:width="10.921cm" svg:height="1.142cm" svg:x="13.208cm" svg:y="3.505cm">
          <text:p text:style-name="P10"><text:span text:style-name="T7">Vorteile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7" draw:style-name="gr67" draw:text-style-name="P17" draw:layer="layout" svg:width="9.905cm" svg:height="7.619cm" svg:x="13.716cm" svg:y="4.953cm">
          <text:list text:style-name="L10">
            <text:list-item>
              <text:p text:style-name="P16"><text:span text:style-name="T17">Simpel gehaltener Code für einfache Wartung.</text:span></text:p>
            </text:list-item>
            <text:list-item>
              <text:p text:style-name="P16"><text:span text:style-name="T17">Erweiterbar durch weitere Tabellen und Attribute.</text:span></text:p>
            </text:list-item>
            <text:list-item>
              <text:p text:style-name="P16"><text:span text:style-name="T17">Modularität.</text:span></text:p>
            </text:list-item>
            <text:list-item>
              <text:p text:style-name="P16"><text:span text:style-name="T17">Eingabe validierungen.</text:span></text:p>
            </text:list-item>
          </text:list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4" draw:layer="layout" svg:width="15.239cm" svg:height="8.572cm" svg:x="1.905cm" svg:y="3.175cm" draw:page-number="7" presentation:class="page"/>
          <draw:frame draw:name="Notes Placeholder 2" presentation:style-name="pr1" draw:text-style-name="P4" draw:layer="layout" svg:width="15.239cm" svg:height="10cm" svg:x="1.905cm" svg:y="12.224cm" presentation:class="notes" presentation:user-transformed="true">
            <draw:text-box>
              <text:p text:style-name="P3"><text:span text:style-name="T4">Ehrlich berichten was schwierig war. Zeigt Reflexion.</text:span></text:p>
            </draw:text-box>
          </draw:frame>
          <draw:frame draw:name="Slide Number Placeholder 3" presentation:style-name="pr2" draw:text-style-name="P6" draw:layer="layout" svg:width="8.254cm" svg:height="1.273cm" svg:x="10.791cm" svg:y="24.126cm" presentation:class="page-number" presentation:user-transformed="true">
            <draw:text-box>
              <text:p text:style-name="P5"><text:span text:style-name="T5"><text:page-number>&lt;number&gt;</text:page-number></text:span></text:p>
            </draw:text-box>
          </draw:frame>
        </presentation:notes>
      </draw:page>
      <draw:page draw:name="page8" draw:style-name="dp3" draw:master-page-name="DEFAULT">
        <draw:custom-shape draw:name="Text 27" draw:style-name="gr68" draw:text-style-name="P2" draw:layer="layout" svg:width="22.351cm" svg:height="1.777cm" svg:x="1.524cm" svg:y="0.889cm">
          <text:p text:style-name="P1"><text:span text:style-name="T6">Zukunft &amp; Wartung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hape 16" draw:style-name="gr6" draw:text-style-name="P7" draw:layer="layout" svg:x1="1.524cm" svg:y1="2.794cm" svg:x2="23.876cm" svg:y2="2.795cm">
          <text:p/>
        </draw:line>
        <draw:custom-shape draw:name="Shape 19" draw:style-name="gr69" draw:text-style-name="P8" draw:layer="layout" svg:width="15.73cm" svg:height="9.905cm" svg:x="1.27cm" svg:y="3.302cm">
          <text:p/>
          <draw:enhanced-geometry draw:mirror-horizontal="false" draw:mirror-vertical="false" draw:glue-points="?f8 0 0 ?f9 ?f8 ?f10 ?f11 ?f9" draw:text-areas="?f5 ?f5 ?f6 ?f7" svg:viewBox="0 0 0 0" draw:type="ooxml-roundRect" draw:modifiers="2564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Text 29" draw:style-name="gr70" draw:text-style-name="P17" draw:layer="layout" svg:width="21.222cm" svg:height="7.619cm" svg:x="1.778cm" svg:y="4.953cm">
          <text:list text:style-name="L9">
            <text:list-item>
              <text:p text:style-name="P19"><text:span text:style-name="T8">Ergänzung durch weitere Tabellen, wie z.B </text:span><text:span text:style-name="T8">Mitarbeiter </text:span></text:p>
            </text:list-item>
            <text:list-item>
              <text:p text:style-name="P19"><text:span text:style-name="T8">Erweiterung von Attributen</text:span></text:p>
            </text:list-item>
            <text:list-item>
              <text:p text:style-name="P19"><text:span text:style-name="T8">Authentifizierungen durch Benutzer Accounts</text:span></text:p>
            </text:list-item>
          </text:list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name="Slide Image Placeholder 2" draw:style-name="gr4" draw:layer="layout" svg:width="15.239cm" svg:height="8.572cm" svg:x="1.905cm" svg:y="3.175cm" draw:page-number="8" presentation:class="page"/>
          <draw:frame draw:name="Notes Placeholder 1" presentation:style-name="pr1" draw:text-style-name="P4" draw:layer="layout" svg:width="15.239cm" svg:height="10cm" svg:x="1.905cm" svg:y="12.224cm" presentation:class="notes" presentation:user-transformed="true">
            <draw:text-box>
              <text:p text:style-name="P3"><text:span text:style-name="T4">Ehrlich berichten was schwierig war. Zeigt Reflexion.</text:span></text:p>
            </draw:text-box>
          </draw:frame>
          <draw:frame draw:name="Slide Number Placeholder 1" presentation:style-name="pr2" draw:text-style-name="P6" draw:layer="layout" svg:width="8.254cm" svg:height="1.273cm" svg:x="10.791cm" svg:y="24.126cm" presentation:class="page-number" presentation:user-transformed="true">
            <draw:text-box>
              <text:p text:style-name="P5"><text:span text:style-name="T5"><text:page-number>&lt;number&gt;</text:page-number></text:span></text:p>
            </draw:text-box>
          </draw:frame>
        </presentation:notes>
      </draw:page>
      <draw:page draw:name="page9" draw:style-name="dp3" draw:master-page-name="DEFAULT">
        <office:forms form:automatic-focus="false" form:apply-design-mode="false"/>
        <draw:custom-shape draw:name="Text 28" draw:style-name="gr71" draw:text-style-name="P2" draw:layer="layout" svg:width="22.351cm" svg:height="1.777cm" svg:x="1.524cm" svg:y="0.889cm">
          <text:p text:style-name="P1"><text:span text:style-name="T6">Zukun</text:span><text:span text:style-name="T6">ft &amp; </text:span><text:span text:style-name="T6">Wartu</text:span><text:span text:style-name="T6">ng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hape 20" draw:style-name="gr6" draw:text-style-name="P7" draw:layer="layout" svg:x1="1.524cm" svg:y1="2.794cm" svg:x2="23.876cm" svg:y2="2.795cm">
          <text:p/>
        </draw:line>
        <draw:custom-shape draw:name="Shape 21" draw:style-name="gr69" draw:text-style-name="P8" draw:layer="layout" svg:width="15.73cm" svg:height="9.905cm" svg:x="1.27cm" svg:y="3.302cm">
          <text:p/>
          <draw:enhanced-geometry draw:mirror-horizontal="false" draw:mirror-vertical="false" draw:glue-points="?f8 0 0 ?f9 ?f8 ?f10 ?f11 ?f9" draw:text-areas="?f5 ?f5 ?f6 ?f7" svg:viewBox="0 0 0 0" draw:type="ooxml-roundRect" draw:modifiers="2564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Text 30" draw:style-name="gr72" draw:text-style-name="P20" draw:layer="layout" svg:width="21.222cm" svg:height="7.619cm" svg:x="1.778cm" svg:y="4.953cm">
          <text:list text:style-name="L9">
            <text:list-item>
              <text:p text:style-name="P19"><text:span text:style-name="T8">Ergänzung durch weitere Tabellen, wie z.B Mitarbeiter </text:span></text:p>
            </text:list-item>
            <text:list-item>
              <text:p text:style-name="P19"><text:span text:style-name="T8">Erweiterung von Attributen</text:span></text:p>
            </text:list-item>
            <text:list-item>
              <text:p text:style-name="P19"><text:span text:style-name="T8">Authentifizierungen durch Benutzer Accounts</text:span></text:p>
            </text:list-item>
          </text:list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3" draw:text-style-name="P21" draw:layer="layout" svg:width="9.599cm" svg:height="6cm" draw:transform="rotate (-1.5707963267949) translate (24cm 3.501cm)">
          <draw:image xlink:href="Pictures/1000000000000FC000000774BE85875C.jpg" xlink:type="simple" xlink:show="embed" xlink:actuate="onLoad" draw:mime-type="image/jpeg">
            <text:p/>
          </draw:image>
        </draw:frame>
        <presentation:notes draw:style-name="dp4">
          <draw:page-thumbnail draw:name="Slide Image Placeholder 3" draw:style-name="gr4" draw:layer="layout" svg:width="15.239cm" svg:height="8.572cm" svg:x="1.905cm" svg:y="3.175cm" draw:page-number="9" presentation:class="page"/>
          <draw:frame draw:name="Notes Placeholder 3" presentation:style-name="pr1" draw:text-style-name="P4" draw:layer="layout" svg:width="15.239cm" svg:height="10cm" svg:x="1.905cm" svg:y="12.224cm" presentation:class="notes" presentation:user-transformed="true">
            <draw:text-box>
              <text:p text:style-name="P3"><text:span text:style-name="T4">Ehrlich berichten was schwierig war. Zeigt Reflexion.</text:span></text:p>
            </draw:text-box>
          </draw:frame>
          <draw:frame draw:name="Slide Number Placeholder 2" presentation:style-name="pr2" draw:text-style-name="P6" draw:layer="layout" svg:width="8.254cm" svg:height="1.273cm" svg:x="10.791cm" svg:y="24.126cm" presentation:class="page-number" presentation:user-transformed="true">
            <draw:text-box>
              <text:p text:style-name="P5"><text:span text:style-name="T5"><text:page-number>&lt;number&gt;</text:page-number></text:span></text:p>
            </draw:text-box>
          </draw:frame>
        </presentation:notes>
      </draw:page>
      <draw:page draw:name="page10" draw:style-name="dp1" draw:master-page-name="DEFAULT">
        <draw:custom-shape draw:name="Text 0" draw:style-name="gr74" draw:text-style-name="P2" draw:layer="layout" svg:width="21.335cm" svg:height="2.158cm" svg:x="2.032cm" svg:y="1.27cm">
          <text:p text:style-name="P1"><text:span text:style-name="T18">Fazit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hape 1" draw:style-name="gr6" draw:text-style-name="P7" draw:layer="layout" svg:x1="2.032cm" svg:y1="3.606cm" svg:x2="23.368cm" svg:y2="3.607cm">
          <text:p/>
        </draw:line>
        <draw:custom-shape draw:name="Text 2" draw:style-name="gr75" draw:text-style-name="P2" draw:layer="layout" svg:width="21.335cm" svg:height="2.793cm" svg:x="2.032cm" svg:y="4.064cm">
          <text:p text:style-name="P1"><text:span text:style-name="T19">GerMan ist eine simple und kompetente Lösung von Hardware Verwaltungs Problemen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" draw:style-name="gr76" draw:text-style-name="P2" draw:layer="layout" svg:width="21.335cm" svg:height="1.015cm" svg:x="2.032cm" svg:y="7.985cm">
          <text:p text:style-name="P1"><text:span text:style-name="T7">Adrian – Eliano - Daniel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" draw:style-name="gr77" draw:text-style-name="P2" draw:layer="layout" svg:width="21.335cm" svg:height="1.142cm" svg:x="2.032cm" svg:y="12.192cm">
          <text:p text:style-name="P1"><text:span text:style-name="T20">Danke für die Aufmerksamkeit!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4" draw:layer="layout" svg:width="15.239cm" svg:height="8.572cm" svg:x="1.905cm" svg:y="3.175cm" draw:page-number="10" presentation:class="page"/>
          <draw:frame draw:name="Notes Placeholder 2" presentation:style-name="pr1" draw:text-style-name="P4" draw:layer="layout" svg:width="15.239cm" svg:height="10cm" svg:x="1.905cm" svg:y="12.224cm" presentation:class="notes" presentation:user-transformed="true">
            <draw:text-box>
              <text:p text:style-name="P3"><text:span text:style-name="T4">Kurzes Fazit. Ausblick zeigt Erweiterbarkeit. Fragen einladen.</text:span></text:p>
            </draw:text-box>
          </draw:frame>
          <draw:frame draw:name="Slide Number Placeholder 3" presentation:style-name="pr2" draw:text-style-name="P6" draw:layer="layout" svg:width="8.254cm" svg:height="1.273cm" svg:x="10.791cm" svg:y="24.126cm" presentation:class="page-number" presentation:user-transformed="true">
            <draw:text-box>
              <text:p text:style-name="P5"><text:span text:style-name="T5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+mn-cs" svg:font-family="+mn-cs"/>
    <style:font-face style:name="+mn-ea" svg:font-family="+mn-ea"/>
    <style:font-face style:name="+mn-lt" svg:font-family="+mn-lt"/>
    <style:font-face style:name="Adwaita Sans" svg:font-family="'Adwaita Sans'" style:font-family-generic="system" style:font-pitch="variable"/>
    <style:font-face style:name="Calibri" svg:font-family="Calibri"/>
    <style:font-face style:name="Calibri1" svg:font-family="Calibri" style:font-family-generic="swiss"/>
    <style:font-face style:name="Calibri2" svg:font-family="Calibri" style:font-family-generic="swiss" style:font-pitch="variable"/>
    <style:font-face style:name="Calibri3" svg:font-family="Calibri" style:font-family-generic="modern" style:font-pitch="fixed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Noto Serif" svg:font-family="'Noto Serif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Noto Serif" fo:font-size="24pt" fo:language="de" fo:country="DE" style:font-name-asian="Adwaita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Noto Sans" fo:font-family="'Noto Sans'" style:font-family-generic="roman" style:font-pitch="variable" fo:font-size="18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ans" fo:font-family="'Noto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 style:writing-mode="lr-tb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DEFAULT-outline2" style:family="presentation" style:parent-style-name="DEFAULT-outline1">
      <style:graphic-properties style:writing-mode="lr-tb"/>
      <style:paragraph-properties fo:margin-top="0.4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DEFAULT-outline3" style:family="presentation" style:parent-style-name="DEFAULT-outline2">
      <style:graphic-properties style:writing-mode="lr-tb"/>
      <style:paragraph-properties fo:margin-top="0.3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DEFAULT-outline4" style:family="presentation" style:parent-style-name="DEFAULT-outline3">
      <style:graphic-properties style:writing-mode="lr-tb"/>
      <style:paragraph-properties fo:margin-top="0.2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Noto Sans" fo:font-family="'Noto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 style:writing-mode="lr-tb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4.288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presentation:style-name="DEFAULT-title" draw:layer="backgroundobjects" svg:width="22.859cm" svg:height="2.385cm" svg:x="1.27cm" svg:y="0.57cm" presentation:class="title" presentation:placeholder="true">
        <draw:text-box/>
      </draw:frame>
      <draw:frame presentation:style-name="DEFAULT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title>Hardware Datenbank</dc:title>
    <dc:subject>PptxGenJS Presentation</dc:subject>
    <meta:initial-creator>PptxGenJS</meta:initial-creator>
    <meta:editing-cycles>14</meta:editing-cycles>
    <meta:creation-date>2026-06-28T22:12:03</meta:creation-date>
    <dc:date>2026-06-29T22:27:29.745356505</dc:date>
    <meta:editing-duration>PT1H18M23S</meta:editing-duration>
    <meta:generator>LibreOffice/25.8.7.3$Linux_X86_64 LibreOffice_project/580$Build-3</meta:generator>
    <meta:document-statistic meta:object-count="160"/>
    <meta:user-defined meta:name="AppVersion">16.0000</meta:user-defined>
    <meta:user-defined meta:name="Company">PptxGenJS</meta:user-defined>
    <meta:user-defined meta:name="Notes" meta:value-type="float">8</meta:user-defined>
    <meta:user-defined meta:name="PresentationFormat">On-screen Show (16:9)</meta:user-defined>
    <meta:user-defined meta:name="Slides" meta:value-type="float">8</meta:user-defined>
  </office:meta>
</office:document-meta>
</file>