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itle">
      <style:text-properties officeooo:rsid="000048b9" officeooo:paragraph-rsid="000048b9"/>
    </style:style>
    <style:style style:name="P2" style:family="paragraph" style:parent-style-name="Text_20_body">
      <style:text-properties officeooo:rsid="000048b9" officeooo:paragraph-rsid="00004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Man<text:line-break/>Dokumentation</text:p>
      <text:p text:style-name="P2">as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e" fo:country="DE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e" fo:country="DE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8T01:40:24.530705307</meta:creation-date>
    <dc:date>2026-06-28T01:49:20.902158527</dc:date>
    <meta:editing-duration>PT8M57S</meta:editing-duration>
    <meta:editing-cycles>1</meta:editing-cycles>
    <meta:document-statistic meta:table-count="0" meta:image-count="0" meta:object-count="0" meta:page-count="1" meta:paragraph-count="2" meta:word-count="3" meta:character-count="23" meta:non-whitespace-character-count="22"/>
    <meta:generator>LibreOffice/25.8.7.3$Linux_X86_64 LibreOffice_project/580$Build-3</meta:generator>
  </office:meta>
</office:document-meta>
</file>